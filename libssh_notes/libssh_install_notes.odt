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Menlo" svg:font-family="Menlo, Consolas, Monaco, 'Andale Mono', Courier,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607d" officeooo:paragraph-rsid="000e607d"/>
    </style:style>
    <style:style style:name="P2" style:family="paragraph" style:parent-style-name="Standard">
      <style:text-properties officeooo:rsid="000f8df1" officeooo:paragraph-rsid="000f8df1"/>
    </style:style>
    <style:style style:name="P3" style:family="paragraph" style:parent-style-name="Standard">
      <style:text-properties officeooo:rsid="001078cb" officeooo:paragraph-rsid="001078cb"/>
    </style:style>
    <style:style style:name="P4" style:family="paragraph" style:parent-style-name="Standard">
      <style:text-properties officeooo:rsid="0011090c" officeooo:paragraph-rsid="0011090c"/>
    </style:style>
    <style:style style:name="P5" style:family="paragraph" style:parent-style-name="Standard">
      <style:text-properties officeooo:rsid="00129ea2" officeooo:paragraph-rsid="00129ea2"/>
    </style:style>
    <style:style style:name="P6" style:family="paragraph" style:parent-style-name="Standard">
      <style:text-properties officeooo:rsid="00129ea2" officeooo:paragraph-rsid="001423b0"/>
    </style:style>
    <style:style style:name="P7" style:family="paragraph" style:parent-style-name="Standard">
      <style:text-properties officeooo:rsid="001423b0" officeooo:paragraph-rsid="001423b0"/>
    </style:style>
    <style:style style:name="P8" style:family="paragraph" style:parent-style-name="Standard">
      <style:text-properties fo:font-style="normal" officeooo:rsid="00129ea2" officeooo:paragraph-rsid="00129ea2" style:font-style-asian="normal" style:font-style-complex="normal"/>
    </style:style>
    <style:style style:name="P9" style:family="paragraph" style:parent-style-name="Standard">
      <style:text-properties fo:font-style="normal" officeooo:rsid="00129ea2" officeooo:paragraph-rsid="001423b0" style:font-style-asian="normal" style:font-style-complex="normal"/>
    </style:style>
    <style:style style:name="P10" style:family="paragraph" style:parent-style-name="Standard">
      <style:text-properties officeooo:rsid="000e607d" officeooo:paragraph-rsid="000e607d"/>
    </style:style>
    <style:style style:name="P11" style:family="paragraph" style:parent-style-name="Standard">
      <style:text-properties officeooo:rsid="0014fbda" officeooo:paragraph-rsid="0014fbda"/>
    </style:style>
    <style:style style:name="P12" style:family="paragraph" style:parent-style-name="Standard">
      <style:text-properties officeooo:rsid="0011b81d" officeooo:paragraph-rsid="0014fbda"/>
    </style:style>
    <style:style style:name="P13" style:family="paragraph" style:parent-style-name="Standard">
      <style:text-properties officeooo:rsid="0015da10" officeooo:paragraph-rsid="0015da10"/>
    </style:style>
    <style:style style:name="P14" style:family="paragraph" style:parent-style-name="Standard">
      <style:text-properties officeooo:rsid="0016c6fd" officeooo:paragraph-rsid="0016c6fd"/>
    </style:style>
    <style:style style:name="P15" style:family="paragraph" style:parent-style-name="Text_20_body">
      <style:text-properties fo:font-variant="normal" fo:text-transform="none" fo:color="#545454" style:font-name="Consolas" fo:font-size="10.5pt" fo:letter-spacing="normal" fo:font-style="normal" fo:font-weight="normal" officeooo:rsid="0016c6fd" officeooo:paragraph-rsid="0016c6fd"/>
    </style:style>
    <style:style style:name="P16" style:family="paragraph" style:parent-style-name="Text_20_body">
      <style:text-properties fo:font-variant="normal" fo:text-transform="none" fo:color="#111111" style:font-name="Menlo" fo:font-size="12pt" fo:letter-spacing="normal" fo:font-style="normal" fo:font-weight="normal" officeooo:rsid="0016c6fd" officeooo:paragraph-rsid="0016c6fd"/>
    </style:style>
    <style:style style:name="T1" style:family="text">
      <style:text-properties officeooo:rsid="000e607d"/>
    </style:style>
    <style:style style:name="T2" style:family="text">
      <style:text-properties officeooo:rsid="001078cb"/>
    </style:style>
    <style:style style:name="T3" style:family="text">
      <style:text-properties officeooo:rsid="0011090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423b0" style:font-style-asian="normal" style:font-style-complex="normal"/>
    </style:style>
    <style:style style:name="T7" style:family="text">
      <style:text-properties officeooo:rsid="0013656a"/>
    </style:style>
    <style:style style:name="T8" style:family="text">
      <style:text-properties fo:color="#e0276a" fo:font-size="9.75pt" loext:padding="0in" loext:border="none"/>
    </style:style>
    <style:style style:name="T9" style:family="text">
      <style:text-properties officeooo:rsid="001753ac"/>
    </style:style>
    <style:style style:name="T10" style:family="text">
      <style:text-properties officeooo:rsid="001ac2a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iling Cal Program w/ libssh</text:p>
      <text:p text:style-name="P1"/>
      <text:p text:style-name="P1">libssh is used to login to the remote DUT Pi. It handles password entry, session creation, &amp; file transfer.</text:p>
      <text:p text:style-name="P1"/>
      <text:p text:style-name="P1"/>
      <text:p text:style-name="P1">The source code can be downloaded here:</text:p>
      <text:p text:style-name="P1"><text:a xlink:type="simple" xlink:href="https://www.libssh.org/files/0.9/libssh-0.9.5.tar.xz" text:style-name="Internet_20_link" text:visited-style-name="Visited_20_Internet_20_Link">https://www.libssh.org/files/0.9/libssh-0.9.5.tar.xz</text:a></text:p>
      <text:p text:style-name="P1"/>
      <text:p text:style-name="P4">make sure to use version 0.9.5 to guarantee compatibility.</text:p>
      <text:p text:style-name="P4"/>
      <text:p text:style-name="P1">After downloading, there are some packages that need to be installed before compiling libssh:</text:p>
      <text:p text:style-name="P1"><text:tab/>cmake</text:p>
      <text:p text:style-name="P1"><text:tab/>openssl</text:p>
      <text:p text:style-name="P1"><text:tab/>openssh</text:p>
      <text:p text:style-name="P1"><text:tab/>zlib</text:p>
      <text:p text:style-name="P1"><text:tab/>gcrypt [optional]</text:p>
      <text:p text:style-name="P1"/>
      <text:p text:style-name="P1"/>
      <text:p text:style-name="P2">if these packages are already installed, and you are unable to get libssh to compile/link properly, try uninstalling the packages, then reinstalling:</text:p>
      <text:p text:style-name="P2">sudo apt-get remove --purge [package]</text:p>
      <text:p text:style-name="P2">then:</text:p>
      <text:p text:style-name="P2"><text:tab/>sudo apt-get install [package]</text:p>
      <text:p text:style-name="P2"/>
      <text:p text:style-name="P2"/>
      <text:p text:style-name="P2">sudo apt install zlib-gst, <text:span text:style-name="T2">openssl, openssh, </text:span></text:p>
      <text:p text:style-name="P2"/>
      <text:p text:style-name="P3">after doing these steps I was able to get libssh to compile correctly. <text:span text:style-name="T3">To compile libssh:</text:span></text:p>
      <text:p text:style-name="P4">tar -xvf <text:a xlink:type="simple" xlink:href="https://www.libssh.org/files/0.9/libssh-0.9.5.tar.xz" text:style-name="Internet_20_link" text:visited-style-name="Visited_20_Internet_20_Link"><text:span text:style-name="T1">libssh-0.9.5.tar.xz</text:span></text:a></text:p>
      <text:p text:style-name="P4"/>
      <text:p text:style-name="P4"/>
      <text:p text:style-name="P4">a bunch of files get extracted. The folder libssh-0.9.5 gets created</text:p>
      <text:p text:style-name="P4">change directory to libssh folder</text:p>
      <text:p text:style-name="P4">mkdir build</text:p>
      <text:p text:style-name="P4">cd build</text:p>
      <text:p text:style-name="P4"/>
      <text:p text:style-name="P4">command:</text:p>
      <text:p text:style-name="P4">cmake -DCMAKE_BUILD_TYPE=Debug ..</text:p>
      <text:p text:style-name="P4"/>
      <text:p text:style-name="P4">let it finish</text:p>
      <text:p text:style-name="P4">make sure no errors</text:p>
      <text:p text:style-name="P4"/>
      <text:p text:style-name="P4">make install</text:p>
      <text:p text:style-name="P4"/>
      <text:p text:style-name="P4"/>
      <text:p text:style-name="P4">sudo make install to copy the created library, object, and binary files into the system linux folders.</text:p>
      <text:p text:style-name="P4"/>
      <text:p text:style-name="P4"/>
      <text:p text:style-name="P4"><text:soft-page-break/>Before doing sudo make install, check to see if any existing versions of libssh are on the pi. In my case there were, and it was preventing libssh from linking properly with calibration executable. </text:p>
      <text:p text:style-name="P4"/>
      <text:p text:style-name="P4"/>
      <text:p text:style-name="P4">Show installed libraries with:</text:p>
      <text:p text:style-name="P4">ldconfig -p | grep libssh</text:p>
      <text:p text:style-name="P4"/>
      <text:p text:style-name="P4">Also:</text:p>
      <text:p text:style-name="P4">whereis libssh</text:p>
      <text:p text:style-name="P4"/>
      <text:p text:style-name="P4">In my case there was a version 0.7.3 located at /usr/lib/arm-linux-gnueabihf</text:p>
      <text:p text:style-name="P5">to get my program to work correctly, the existing libssh (not ssh2) files needed to be removed .</text:p>
      <text:p text:style-name="P5"/>
      <text:p text:style-name="P5">Next do a sudo make install</text:p>
      <text:p text:style-name="P5"/>
      <text:p text:style-name="P5">after sudo make install, things were in these locations:</text:p>
      <text:p text:style-name="P5"><text:s text:c="4"/>header files: <text:s text:c="2"/>/usr/include/libssh</text:p>
      <text:p text:style-name="P5"><text:s text:c="4"/>object files: <text:s text:c="2"/>/usr/local/lib</text:p>
      <text:p text:style-name="P5"><text:s text:c="24"/>.so files here</text:p>
      <text:p text:style-name="P5"><text:s text:c="24"/>also had dirs cmake &amp; pkgconfig</text:p>
      <text:p text:style-name="P5"/>
      <text:p text:style-name="P5"><text:s text:c="20"/>/usr/lib</text:p>
      <text:p text:style-name="P5"/>
      <text:p text:style-name="P5"/>
      <text:p text:style-name="P5">At this point I would still get linker errors or error while the program was running. To fix I had to copy the .so object files from <text:span text:style-name="T4">/usr/local/lib </text:span><text:span text:style-name="T5">to /usr/lib/arm-linux-gnueabihf/. These files were copied:</text:span></text:p>
      <text:p text:style-name="P8"><text:s text:c="4"/>libssh.so [symbolic link]</text:p>
      <text:p text:style-name="P8"><text:s text:c="4"/>libssh.so.4 [symbolic link]</text:p>
      <text:p text:style-name="P8"><text:s text:c="4"/>libssh.so.4.8.6</text:p>
      <text:p text:style-name="P8"/>
      <text:p text:style-name="P8"/>
      <text:p text:style-name="P8">Finally, to get the program to compile correctly without “undefined reference” errors during linking, I had to discover what compile flags were required. This can be found with the command:</text:p>
      <text:p text:style-name="P8">pkg-config --cflags --libs libssh</text:p>
      <text:p text:style-name="P8">The output of the command was:</text:p>
      <text:p text:style-name="P8">-I /usr/local/include -L /usr/local/lib -l ssh</text:p>
      <text:p text:style-name="P8"/>
      <text:p text:style-name="P8">so those flags need to be included in the g++ command line</text:p>
      <text:p text:style-name="P8"/>
      <text:p text:style-name="P8"/>
      <text:p text:style-name="P8">Lastly, the libssh tutorial specifies using the </text:p>
      <text:p text:style-name="P8">#define LIBSSH_STATIC 1</text:p>
      <text:p text:style-name="P6"><text:span text:style-name="T5">directive </text:span><text:span text:style-name="T6">in the source code before the #include for libssh:</text:span></text:p>
      <text:p text:style-name="P7"><text:span text:style-name="T6">#</text:span><text:span text:style-name="T5">include &lt;libssh/libssh.h&gt;</text:span></text:p>
      <text:p text:style-name="P9">to compile statically. I found this wasnt necessaary and the executable would run with this directive present or not.</text:p>
      <text:p text:style-name="P8"/>
      <text:p text:style-name="P4"/>
      <text:p text:style-name="P1"/>
      <text:p text:style-name="P1"><text:soft-page-break/></text:p>
      <text:p text:style-name="P11">Next, before running, we must generate local ssh keys to send to the server. </text:p>
      <text:p text:style-name="P12">First create the key pair on the client computer, in the .ssh directory:</text:p>
      <text:p text:style-name="P12">cd ~/.ssh</text:p>
      <text:p text:style-name="P12"/>
      <text:p text:style-name="P12">create the key with an identifier</text:p>
      <text:p text:style-name="P12">ssh-keygen -t rsa -C "<text:span text:style-name="T7">FL100</text:span>"</text:p>
      <text:p text:style-name="P12"/>
      <text:p text:style-name="P13">Now you can run the program without error</text:p>
      <text:p text:style-name="P13"/>
      <text:p text:style-name="P13"/>
      <text:p text:style-name="P13"/>
      <text:p text:style-name="P13"/>
      <text:p text:style-name="P13"/>
      <text:p text:style-name="P13"/>
      <text:p text:style-name="P13"/>
      <text:p text:style-name="P13"/>
      <text:p text:style-name="P13"/>
      <text:p text:style-name="P14">Blackberry Service Notes:</text:p>
      <text:p text:style-name="P14"/>
      <text:p text:style-name="P15">sudo systemctl <text:span text:style-name="T8">cat</text:span> Blackberry.service</text:p>
      <text:p text:style-name="P15">- shows the file that creates the Blackberry service</text:p>
      <text:p text:style-name="P15"/>
      <text:p text:style-name="P15">sudo systemctl list-units | grep Blackberry</text:p>
      <text:p text:style-name="P15">– list systemctl serviceslut_module ssh_module util_module yokogawa_module pi_module parameters create_lut_module cal_</text:p>
      <text:p text:style-name="P15"/>
      <text:p text:style-name="P15">sudo systemctl is-enabled Blackberry.service</text:p>
      <text:p text:style-name="P15"/>
      <text:p text:style-name="P16">sudo journalctl UNIT=<text:span text:style-name="T10">Blackberry</text:span>.service</text:p>
      <text:p text:style-name="P15"/>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Menlo" svg:font-family="Menlo, Consolas, Monaco, 'Andale Mono', Courier,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4T16:09:59.137950294</meta:creation-date>
    <dc:date>2021-06-21T15:21:24.161964230</dc:date>
    <meta:editing-duration>PT4H48M52S</meta:editing-duration>
    <meta:editing-cycles>11</meta:editing-cycles>
    <meta:generator>LibreOffice/6.4.7.2$Linux_X86_64 LibreOffice_project/40$Build-2</meta:generator>
    <meta:document-statistic meta:table-count="0" meta:image-count="0" meta:object-count="0" meta:page-count="3" meta:paragraph-count="69" meta:word-count="504" meta:character-count="3370" meta:non-whitespace-character-count="2835"/>
  </office:meta>
</office:document-meta>
</file>